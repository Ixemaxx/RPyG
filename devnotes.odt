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244b" officeooo:paragraph-rsid="0002244b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2244b" officeooo:paragraph-rsid="0002244b" style:font-size-asian="14pt" style:font-size-complex="16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6pt" officeooo:rsid="0002244b" officeooo:paragraph-rsid="0002244b" style:font-size-asian="14pt" style:font-size-complex="16pt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6pt" officeooo:rsid="0002244b" officeooo:paragraph-rsid="0002244b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02a7a8" officeooo:paragraph-rsid="0002a7a8" style:font-size-asian="14pt" style:font-size-complex="16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6pt" officeooo:rsid="0002a7a8" officeooo:paragraph-rsid="0002a7a8" style:font-size-asian="14pt" style:font-size-complex="16pt"/>
    </style:style>
    <style:style style:name="P7" style:family="paragraph" style:parent-style-name="Standard" style:list-style-name="L4">
      <style:paragraph-properties fo:text-align="justify" style:justify-single-word="false"/>
      <style:text-properties fo:font-size="16pt" officeooo:rsid="0002a7a8" officeooo:paragraph-rsid="0002a7a8" style:font-size-asian="14pt" style:font-size-complex="16pt"/>
    </style:style>
    <style:style style:name="P8" style:family="paragraph" style:parent-style-name="Standard" style:list-style-name="L5">
      <style:paragraph-properties fo:text-align="justify" style:justify-single-word="false"/>
      <style:text-properties fo:font-size="16pt" officeooo:rsid="0002a7a8" officeooo:paragraph-rsid="0002a7a8" style:font-size-asian="14pt" style:font-size-complex="16pt"/>
    </style:style>
    <style:style style:name="P9" style:family="paragraph" style:parent-style-name="Standard" style:list-style-name="L6">
      <style:paragraph-properties fo:text-align="justify" style:justify-single-word="false"/>
      <style:text-properties fo:font-size="16pt" officeooo:rsid="0002a7a8" officeooo:paragraph-rsid="0002a7a8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076b4e" officeooo:paragraph-rsid="00076b4e" style:font-size-asian="14pt" style:font-size-complex="16pt"/>
    </style:style>
    <style:style style:name="P11" style:family="paragraph" style:parent-style-name="Standard" style:list-style-name="L7">
      <style:paragraph-properties fo:text-align="justify" style:justify-single-word="false"/>
      <style:text-properties fo:font-size="16pt" officeooo:rsid="00076b4e" officeooo:paragraph-rsid="00076b4e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0bd16f" officeooo:paragraph-rsid="000bd16f" style:font-size-asian="14pt" style:font-size-complex="16pt"/>
    </style:style>
    <style:style style:name="P13" style:family="paragraph" style:parent-style-name="Standard" style:list-style-name="L8">
      <style:paragraph-properties fo:text-align="justify" style:justify-single-word="false"/>
      <style:text-properties fo:font-size="16pt" officeooo:rsid="000bd16f" officeooo:paragraph-rsid="000bd16f" style:font-size-asian="14pt" style:font-size-complex="16pt"/>
    </style:style>
    <style:style style:name="P14" style:family="paragraph" style:parent-style-name="Standard" style:list-style-name="L8">
      <style:paragraph-properties fo:text-align="justify" style:justify-single-word="false"/>
      <style:text-properties fo:font-size="16pt" officeooo:rsid="00119ffc" officeooo:paragraph-rsid="00119ffc" style:font-size-asian="14pt" style:font-size-complex="16pt"/>
    </style:style>
    <style:style style:name="P15" style:family="paragraph" style:parent-style-name="Standard" style:list-style-name="L8">
      <style:paragraph-properties fo:text-align="justify" style:justify-single-word="false"/>
      <style:text-properties fo:font-size="16pt" officeooo:rsid="0011f5cf" officeooo:paragraph-rsid="0011f5cf" style:font-size-asian="14pt" style:font-size-complex="16pt"/>
    </style:style>
    <style:style style:name="T1" style:family="text">
      <style:text-properties officeooo:rsid="001aa8b8"/>
    </style:style>
    <style:style style:name="T2" style:family="text">
      <style:text-properties officeooo:rsid="000bd1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okemon Like (Python)</text:p>
      <text:p text:style-name="P1"/>
      <text:p text:style-name="P1"/>
      <text:p text:style-name="P1"/>
      <text:p text:style-name="P2">Modules:</text:p>
      <text:list text:style-name="L1">
        <text:list-item>
          <text:p text:style-name="P3">Pygame</text:p>
        </text:list-item>
        <text:list-item>
          <text:p text:style-name="P3">Random</text:p>
        </text:list-item>
        <text:list-item>
          <text:p text:style-name="P3">Sqlite 3 (intégration du pokédex <text:span text:style-name="T1">avec</text:span> la base SQL)</text:p>
        </text:list-item>
      </text:list>
      <text:p text:style-name="P2"/>
      <text:p text:style-name="P2">Contenu:</text:p>
      <text:list text:style-name="L2">
        <text:list-item>
          <text:p text:style-name="P4">Système de map géré avec des listes de liste</text:p>
        </text:list-item>
        <text:list-item>
          <text:p text:style-name="P4">Le jeu est une sorte d’intro Pokemon like</text:p>
          <text:list>
            <text:list-item>
              <text:p text:style-name="P4">Début dans une maison</text:p>
            </text:list-item>
            <text:list-item>
              <text:p text:style-name="P4">Choix d’un starter</text:p>
            </text:list-item>
            <text:list-item>
              <text:p text:style-name="P4">Capture dans la nature</text:p>
            </text:list-item>
            <text:list-item>
              <text:p text:style-name="P4">Système de combats</text:p>
            </text:list-item>
          </text:list>
        </text:list-item>
      </text:list>
      <text:p text:style-name="P2"/>
      <text:p text:style-name="P5">Créatures:</text:p>
      <text:list text:style-name="L3">
        <text:list-item>
          <text:p text:style-name="P6">3 Starters avec évolution</text:p>
        </text:list-item>
        <text:list-item>
          <text:p text:style-name="P6">3 créatures trouvables dans la nature</text:p>
        </text:list-item>
      </text:list>
      <text:p text:style-name="P5"/>
      <text:p text:style-name="P5">D.A:</text:p>
      <text:list text:style-name="L4">
        <text:list-item>
          <text:p text:style-name="P7">Pixel art</text:p>
        </text:list-item>
      </text:list>
      <text:p text:style-name="P5"/>
      <text:p text:style-name="P5">Persos:</text:p>
      <text:list text:style-name="L5">
        <text:list-item>
          <text:p text:style-name="P8">Protagoniste (<text:span text:style-name="T2">rq pertinentes)</text:span></text:p>
        </text:list-item>
        <text:list-item>
          <text:p text:style-name="P8">Professeur <text:span text:style-name="T2">(beauf)</text:span></text:p>
        </text:list-item>
        <text:list-item>
          <text:p text:style-name="P8">Rival <text:span text:style-name="T2">(campagnard)</text:span></text:p>
        </text:list-item>
        <text:list-item>
          <text:p text:style-name="P8">1 ou 2 PNJ à recycler <text:span text:style-name="T2">(des locaux)</text:span></text:p>
        </text:list-item>
      </text:list>
      <text:p text:style-name="P5"/>
      <text:p text:style-name="P5">Artwork:</text:p>
      <text:list text:style-name="L6">
        <text:list-item>
          <text:p text:style-name="P9">Labo pokémon</text:p>
        </text:list-item>
        <text:list-item>
          <text:p text:style-name="P9">Centre pokémon</text:p>
        </text:list-item>
        <text:list-item>
          <text:p text:style-name="P9">Boutique</text:p>
        </text:list-item>
        <text:list-item>
          <text:p text:style-name="P9">Maison (recyclable)</text:p>
        </text:list-item>
        <text:list-item>
          <text:p text:style-name="P9">arbre</text:p>
        </text:list-item>
        <text:list-item>
          <text:p text:style-name="P9">Chemin</text:p>
        </text:list-item>
        <text:list-item>
          <text:p text:style-name="P9">Herbe</text:p>
        </text:list-item>
        <text:list-item>
          <text:p text:style-name="P9">Butte de terre (franchissable d’un seul côté)</text:p>
        </text:list-item>
      </text:list>
      <text:p text:style-name="P10"><text:soft-page-break/>Mécas spéciales:</text:p>
      <text:list text:style-name="L7">
        <text:list-item>
          <text:p text:style-name="P11">Système de map</text:p>
        </text:list-item>
        <text:list-item>
          <text:p text:style-name="P11">Système de combat</text:p>
        </text:list-item>
        <text:list-item>
          <text:p text:style-name="P11">Système de collection (équipe)</text:p>
        </text:list-item>
        <text:list-item>
          <text:p text:style-name="P11">Pokédex (limité en créatures)</text:p>
        </text:list-item>
      </text:list>
      <text:p text:style-name="P10"/>
      <text:p text:style-name="P12">Pitch:</text:p>
      <text:list text:style-name="L8">
        <text:list-item>
          <text:p text:style-name="P13">Le protagoniste vient d’emménager dans un bled paumé (style ferme), il fait la découverte du professeur qui lui propose de découvrir la chasse aux créatures</text:p>
        </text:list-item>
        <text:list-item>
          <text:p text:style-name="P14">Une femme se fait écraser par une botte de foin, ton pokémon apprend une capacité pour décaler la botte et la sauver.</text:p>
        </text:list-item>
        <text:list-item>
          <text:p text:style-name="P14">La femme s’avère être la gérante de la boutique (déblocage des pokéballs, potions, rappels…)</text:p>
        </text:list-item>
        <text:list-item>
          <text:p text:style-name="P15">Un pnj montre comment capturer des pokémons dans la nature</text:p>
        </text:list-item>
        <text:list-item>
          <text:p text:style-name="P15">Ton rival te provoque</text:p>
        </text:list-item>
        <text:list-item>
          <text:p text:style-name="P15">[optionnel] Un tournoi pokémon est organisé pour savoir qui est le meilleur dresseur</text:p>
        </text:list-item>
      </text:list>
      <text:p text:style-name="P1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1:17:16.709127600</meta:creation-date>
    <dc:date>2026-01-25T01:33:45.837617500</dc:date>
    <meta:editing-duration>PT16M26S</meta:editing-duration>
    <meta:editing-cycles>7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43" meta:word-count="235" meta:character-count="1263" meta:non-whitespace-character-count="1105"/>
  </office:meta>
</office:document-meta>
</file>